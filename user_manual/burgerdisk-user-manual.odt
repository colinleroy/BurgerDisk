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980000032D01B4C29C.png" manifest:media-type="image/png"/>
  <manifest:file-entry manifest:full-path="Pictures/1000000100000474000003C67FB76F5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style:style>
    <style:style style:name="Table1.A" style:family="table-column">
      <style:table-column-properties style:column-width="6.6951in" style:rel-column-width="65535*"/>
    </style:style>
    <style:style style:name="Table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155f19b" officeooo:paragraph-rsid="0155f19b"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officeooo:paragraph-rsid="001acb08"/>
    </style:style>
    <style:style style:name="P10" style:family="paragraph" style:parent-style-name="Contents_20_1">
      <style:paragraph-properties>
        <style:tab-stops>
          <style:tab-stop style:position="5.7693in" style:type="right" style:leader-style="dotted" style:leader-text="."/>
        </style:tab-stops>
      </style:paragraph-properties>
    </style:style>
    <style:style style:name="P11" style:family="paragraph" style:parent-style-name="Figure_20_Index_20_1">
      <style:paragraph-properties>
        <style:tab-stops>
          <style:tab-stop style:position="5.7693in" style:type="right" style:leader-style="dotted" style:leader-text="."/>
        </style:tab-stops>
      </style:paragraph-properties>
    </style:style>
    <style:style style:name="P12" style:family="paragraph" style:parent-style-name="Table_20_index_20_1">
      <style:paragraph-properties>
        <style:tab-stops>
          <style:tab-stop style:position="5.7693in" style:type="right" style:leader-style="dotted" style:leader-text="."/>
        </style:tab-stops>
      </style:paragraph-properties>
    </style:style>
    <style:style style:name="P13" style:family="paragraph" style:parent-style-name="Text_20_body">
      <style:text-properties officeooo:rsid="0158889c" officeooo:paragraph-rsid="0158889c"/>
    </style:style>
    <style:style style:name="P14" style:family="paragraph" style:parent-style-name="Text_20_body">
      <style:paragraph-properties fo:break-before="page"/>
      <style:text-properties officeooo:rsid="0158889c" officeooo:paragraph-rsid="0158889c"/>
    </style:style>
    <style:style style:name="P15" style:family="paragraph" style:parent-style-name="Text_20_body">
      <style:text-properties officeooo:rsid="0156ae85" officeooo:paragraph-rsid="0156ae85"/>
    </style:style>
    <style:style style:name="P16" style:family="paragraph" style:parent-style-name="Table">
      <style:paragraph-properties fo:keep-with-next="always"/>
    </style:style>
    <style:style style:name="P17" style:family="paragraph" style:parent-style-name="Table_20_Contents">
      <style:text-properties style:font-name="Latin Modern Mono1"/>
    </style:style>
    <style:style style:name="P18" style:family="paragraph" style:parent-style-name="Table_20_Contents">
      <style:text-properties style:font-name="Latin Modern Mono1" officeooo:rsid="01574013" officeooo:paragraph-rsid="01574013"/>
    </style:style>
    <style:style style:name="P19" style:family="paragraph" style:parent-style-name="Text_20_body">
      <style:text-properties officeooo:rsid="00fb280c" officeooo:paragraph-rsid="0156ae85"/>
    </style:style>
    <style:style style:name="P20" style:family="paragraph" style:parent-style-name="Text_20_body">
      <style:text-properties officeooo:rsid="0158ddbc" officeooo:paragraph-rsid="0158ddbc"/>
    </style:style>
    <style:style style:name="P21" style:family="paragraph" style:parent-style-name="Text_20_body">
      <style:text-properties officeooo:rsid="015a1539" officeooo:paragraph-rsid="015a1539"/>
    </style:style>
    <style:style style:name="P22" style:family="paragraph" style:parent-style-name="Text_20_body">
      <style:text-properties officeooo:rsid="015ab0d3" officeooo:paragraph-rsid="015ab0d3"/>
    </style:style>
    <style:style style:name="P23" style:family="paragraph" style:parent-style-name="Text_20_body">
      <style:text-properties officeooo:rsid="015ab0d3" officeooo:paragraph-rsid="015ae994"/>
    </style:style>
    <style:style style:name="P24" style:family="paragraph" style:parent-style-name="Text_20_body">
      <style:text-properties officeooo:rsid="015c690c" officeooo:paragraph-rsid="015c690c"/>
    </style:style>
    <style:style style:name="P25" style:family="paragraph" style:parent-style-name="Text_20_body">
      <style:text-properties fo:font-style="italic" officeooo:rsid="016162f6" officeooo:paragraph-rsid="016162f6" style:font-style-asian="italic" style:font-style-complex="italic"/>
    </style:style>
    <style:style style:name="P26" style:family="paragraph" style:parent-style-name="Text_20_body">
      <style:text-properties fo:font-style="italic" officeooo:rsid="01650883" officeooo:paragraph-rsid="0173dfe3" style:font-style-asian="italic" style:font-style-complex="italic"/>
    </style:style>
    <style:style style:name="P27" style:family="paragraph" style:parent-style-name="Contents_20_2">
      <style:paragraph-properties>
        <style:tab-stops>
          <style:tab-stop style:position="5.5728in" style:type="right" style:leader-style="dotted" style:leader-text="."/>
        </style:tab-stops>
      </style:paragraph-properties>
    </style:style>
    <style:style style:name="P28" style:family="paragraph" style:parent-style-name="Text_20_body">
      <style:text-properties officeooo:rsid="0163434d" officeooo:paragraph-rsid="0163434d"/>
    </style:style>
    <style:style style:name="P29" style:family="paragraph" style:parent-style-name="Text_20_body">
      <style:text-properties officeooo:rsid="0163434d" officeooo:paragraph-rsid="0170b5ef"/>
    </style:style>
    <style:style style:name="P30" style:family="paragraph" style:parent-style-name="Text_20_body">
      <style:text-properties officeooo:rsid="01650883" officeooo:paragraph-rsid="01650883"/>
    </style:style>
    <style:style style:name="P31" style:family="paragraph" style:parent-style-name="Text_20_body">
      <style:text-properties fo:font-style="normal" officeooo:rsid="016c738f" officeooo:paragraph-rsid="016c738f" style:font-style-asian="normal" style:font-style-complex="normal"/>
    </style:style>
    <style:style style:name="P32" style:family="paragraph" style:parent-style-name="Text_20_body">
      <style:text-properties officeooo:rsid="0175dbb9" officeooo:paragraph-rsid="0175dbb9"/>
    </style:style>
    <style:style style:name="P33" style:family="paragraph" style:parent-style-name="Text_20_body">
      <style:text-properties officeooo:rsid="01718ae1" officeooo:paragraph-rsid="0158ddbc"/>
    </style:style>
    <style:style style:name="P34" style:family="paragraph" style:parent-style-name="Text_20_body">
      <style:text-properties officeooo:rsid="017d6f88" officeooo:paragraph-rsid="017d6f88"/>
    </style:style>
    <style:style style:name="P35" style:family="paragraph" style:parent-style-name="Text_20_body">
      <style:text-properties officeooo:paragraph-rsid="01684033"/>
    </style:style>
    <style:style style:name="P36" style:family="paragraph" style:parent-style-name="Text_20_body">
      <style:text-properties officeooo:rsid="0183e08c" officeooo:paragraph-rsid="0183e08c"/>
    </style:style>
    <style:style style:name="P37" style:family="paragraph" style:parent-style-name="Contents_20_Heading" style:master-page-name="Forepages">
      <style:paragraph-properties style:page-number="auto"/>
    </style:style>
    <style:style style:name="P38"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39" style:family="paragraph" style:parent-style-name="Heading_20_1">
      <style:text-properties officeooo:rsid="016e2d19" officeooo:paragraph-rsid="016e2d19"/>
    </style:style>
    <style:style style:name="P40" style:family="paragraph" style:parent-style-name="Heading_20_1" style:master-page-name="Standard">
      <style:paragraph-properties style:page-number="auto"/>
      <style:text-properties officeooo:rsid="0074f29c" officeooo:paragraph-rsid="0074f29c"/>
    </style:style>
    <style:style style:name="P41" style:family="paragraph" style:parent-style-name="Heading_20_1">
      <style:paragraph-properties fo:break-before="page"/>
      <style:text-properties officeooo:paragraph-rsid="001c9030"/>
    </style:style>
    <style:style style:name="P42" style:family="paragraph" style:parent-style-name="Heading_20_1">
      <style:paragraph-properties fo:break-before="page"/>
      <style:text-properties officeooo:rsid="0163434d" officeooo:paragraph-rsid="0163434d"/>
    </style:style>
    <style:style style:name="P43" style:family="paragraph" style:parent-style-name="Heading_20_1" style:list-style-name="">
      <style:text-properties officeooo:rsid="01650883" officeooo:paragraph-rsid="01650883"/>
    </style:style>
    <style:style style:name="P44" style:family="paragraph" style:parent-style-name="Heading_20_1" style:list-style-name="">
      <style:text-properties officeooo:rsid="0158889c" officeooo:paragraph-rsid="0158889c"/>
    </style:style>
    <style:style style:name="P45" style:family="paragraph" style:parent-style-name="Heading_20_2">
      <style:text-properties officeooo:rsid="0156ae85" officeooo:paragraph-rsid="0156ae85"/>
    </style:style>
    <style:style style:name="P46" style:family="paragraph" style:parent-style-name="Heading_20_2">
      <style:text-properties officeooo:rsid="01684033" officeooo:paragraph-rsid="01684033"/>
    </style:style>
    <style:style style:name="P47" style:family="paragraph" style:parent-style-name="Heading_20_2">
      <style:text-properties officeooo:rsid="0158889c" officeooo:paragraph-rsid="0158889c"/>
    </style:style>
    <style:style style:name="P48" style:family="paragraph" style:parent-style-name="Text_20_body" style:list-style-name="L1">
      <style:text-properties officeooo:rsid="0156ae85" officeooo:paragraph-rsid="0156ae85"/>
    </style:style>
    <style:style style:name="P49" style:family="paragraph" style:parent-style-name="Text_20_body" style:list-style-name="L2">
      <style:text-properties officeooo:rsid="015ab0d3" officeooo:paragraph-rsid="015ab0d3"/>
    </style:style>
    <style:style style:name="P50" style:family="paragraph" style:parent-style-name="Text_20_body" style:list-style-name="L3">
      <style:text-properties officeooo:rsid="0158889c" officeooo:paragraph-rsid="0158889c"/>
    </style:style>
    <style:style style:name="P51" style:family="paragraph" style:parent-style-name="Text_20_body" style:list-style-name="L3">
      <style:text-properties officeooo:rsid="0175dbb9" officeooo:paragraph-rsid="0175dbb9"/>
    </style:style>
    <style:style style:name="P52" style:family="paragraph" style:parent-style-name="Text_20_body" style:list-style-name="L4">
      <style:text-properties officeooo:rsid="0175dbb9" officeooo:paragraph-rsid="0175dbb9"/>
    </style:style>
    <style:style style:name="P53" style:family="paragraph" style:parent-style-name="Text_20_body" style:list-style-name="L3">
      <style:text-properties officeooo:rsid="0158ddbc" officeooo:paragraph-rsid="0158ddbc"/>
    </style:style>
    <style:style style:name="P54" style:family="paragraph" style:parent-style-name="Text_20_body" style:list-style-name="L4">
      <style:text-properties officeooo:rsid="0158ddbc" officeooo:paragraph-rsid="0158ddbc"/>
    </style:style>
    <style:style style:name="T1" style:family="text">
      <style:text-properties style:font-name="Latin Modern Mono" fo:font-weight="normal" officeooo:rsid="001acb08" style:font-weight-asian="normal" style:font-weight-complex="normal"/>
    </style:style>
    <style:style style:name="T2" style:family="text">
      <style:text-properties style:font-name="Latin Modern Mono" fo:font-weight="normal" officeooo:rsid="004e1257"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1684033" style:font-weight-asian="bold" style:font-weight-complex="bold"/>
    </style:style>
    <style:style style:name="T5" style:family="text">
      <style:text-properties fo:font-weight="bold" officeooo:rsid="017d6f88" style:font-weight-asian="bold" style:font-weight-complex="bold"/>
    </style:style>
    <style:style style:name="T6" style:family="text">
      <style:text-properties fo:font-weight="bold" officeooo:rsid="017e1714" style:font-weight-asian="bold" style:font-weight-complex="bold"/>
    </style:style>
    <style:style style:name="T7" style:family="text">
      <style:text-properties fo:font-weight="bold" officeooo:rsid="01803144" style:font-weight-asian="bold" style:font-weight-complex="bold"/>
    </style:style>
    <style:style style:name="T8" style:family="text">
      <style:text-properties fo:font-weight="bold" officeooo:rsid="0183e08c" style:font-weight-asian="bold" style:font-weight-complex="bold"/>
    </style:style>
    <style:style style:name="T9" style:family="text">
      <style:text-properties officeooo:rsid="0155f19b"/>
    </style:style>
    <style:style style:name="T10" style:family="text">
      <style:text-properties officeooo:rsid="0156ae85"/>
    </style:style>
    <style:style style:name="T11" style:family="text">
      <style:text-properties fo:font-weight="normal" style:font-weight-asian="normal" style:font-weight-complex="normal"/>
    </style:style>
    <style:style style:name="T12" style:family="text">
      <style:text-properties fo:font-weight="normal" officeooo:rsid="01798a04" style:font-weight-asian="normal" style:font-weight-complex="normal"/>
    </style:style>
    <style:style style:name="T13" style:family="text">
      <style:text-properties fo:font-weight="normal" officeooo:rsid="017b6989" style:font-weight-asian="normal" style:font-weight-complex="normal"/>
    </style:style>
    <style:style style:name="T14" style:family="text">
      <style:text-properties fo:font-weight="normal" officeooo:rsid="01684033" style:font-weight-asian="normal" style:font-weight-complex="normal"/>
    </style:style>
    <style:style style:name="T15" style:family="text">
      <style:text-properties fo:font-weight="normal" officeooo:rsid="01803144" style:font-weight-asian="normal" style:font-weight-complex="normal"/>
    </style:style>
    <style:style style:name="T16" style:family="text">
      <style:text-properties officeooo:rsid="0158889c"/>
    </style:style>
    <style:style style:name="T17" style:family="text">
      <style:text-properties officeooo:rsid="015d3b94"/>
    </style:style>
    <style:style style:name="T18" style:family="text">
      <style:text-properties officeooo:rsid="0160b86e"/>
    </style:style>
    <style:style style:name="T19" style:family="text">
      <style:text-properties officeooo:rsid="016162f6"/>
    </style:style>
    <style:style style:name="T20" style:family="text">
      <style:text-properties officeooo:rsid="0163434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1798a04" style:font-style-asian="italic" style:font-weight-asian="normal" style:font-style-complex="italic" style:font-weight-complex="normal"/>
    </style:style>
    <style:style style:name="T23" style:family="text">
      <style:text-properties fo:font-style="italic" fo:font-weight="normal" officeooo:rsid="01684033" style:font-style-asian="italic" style:font-weight-asian="normal" style:font-style-complex="italic" style:font-weight-complex="normal"/>
    </style:style>
    <style:style style:name="T24" style:family="text">
      <style:text-properties officeooo:rsid="0170b5ef"/>
    </style:style>
    <style:style style:name="T25" style:family="text">
      <style:text-properties officeooo:rsid="0158ddbc"/>
    </style:style>
    <style:style style:name="T26" style:family="text">
      <style:text-properties officeooo:rsid="0172f9fc"/>
    </style:style>
    <style:style style:name="T27" style:family="text">
      <style:text-properties officeooo:rsid="0173dfe3"/>
    </style:style>
    <style:style style:name="T28" style:family="text">
      <style:text-properties officeooo:rsid="017d6f88"/>
    </style:style>
    <style:style style:name="T29" style:family="text">
      <style:text-properties officeooo:rsid="01684033"/>
    </style:style>
    <style:style style:name="T30" style:family="text">
      <style:text-properties officeooo:rsid="0183e08c"/>
    </style:style>
    <style:style style:name="T31" style:family="text">
      <style:text-properties officeooo:rsid="0184eefc"/>
    </style:style>
    <style:style style:name="T32" style:family="text">
      <style:text-properties officeooo:rsid="0185bf2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right"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9">BurgerDisk/</text:span><text:span text:style-name="T30">DominoDisk</text:span><text:span text:style-name="T9"> Smartport Hard Disk</text:span> for Apple II</text:p>
      <text:p text:style-name="P8"/>
      <text:p text:style-name="P8">User <text:span text:style-name="T9">manual</text:span></text:p>
      <text:p text:style-name="P3"/>
      <text:p text:style-name="P5">Version <text:span text:style-name="T18">2.</text:span><text:span text:style-name="T30">5</text:span></text:p>
      <text:p text:style-name="P6"><text:span text:style-name="T30">April </text:span>2026</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pan text:style-name="T1">colin@colino.net – https://</text:span><text:span text:style-name="T2">www.</text:span><text:span text:style-name="T1">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7">Table of Contents</text:p>
          </text:index-title>
          <text:p text:style-name="P10"><text:a xlink:type="simple" xlink:href="#__RefHeading___Toc1707_2351436161" text:style-name="Index_20_Link" text:visited-style-name="Index_20_Link">Index of Figures<text:tab/>ii</text:a></text:p>
          <text:p text:style-name="P10"><text:a xlink:type="simple" xlink:href="#__RefHeading___Toc1709_2351436161" text:style-name="Index_20_Link" text:visited-style-name="Index_20_Link">Index of Tables<text:tab/>ii</text:a></text:p>
          <text:p text:style-name="P10"><text:a xlink:type="simple" xlink:href="#__RefHeading___Toc6618_899895566" text:style-name="Index_20_Link" text:visited-style-name="Index_20_Link">Introduction<text:tab/>3</text:a></text:p>
          <text:p text:style-name="P10"><text:a xlink:type="simple" xlink:href="#__RefHeading___Toc193_899895566" text:style-name="Index_20_Link" text:visited-style-name="Index_20_Link">BurgerDisk storage configuration<text:tab/>4</text:a></text:p>
          <text:p text:style-name="P27"><text:a xlink:type="simple" xlink:href="#__RefHeading___Toc195_899895566%20Copy%201" text:style-name="Index_20_Link" text:visited-style-name="Index_20_Link">Presenting disk images to the computer<text:tab/>4</text:a></text:p>
          <text:p text:style-name="P27"><text:a xlink:type="simple" xlink:href="#__RefHeading___Toc195_899895566%20Copy%201%20Copy%201" text:style-name="Index_20_Link" text:visited-style-name="Index_20_Link">Debugging and options<text:tab/>5</text:a></text:p>
          <text:p text:style-name="P10"><text:a xlink:type="simple" xlink:href="#__RefHeading___Toc520_3687079298" text:style-name="Index_20_Link" text:visited-style-name="Index_20_Link">BurgerDisk installation<text:tab/>6</text:a></text:p>
          <text:p text:style-name="P10"><text:a xlink:type="simple" xlink:href="#__RefHeading___Toc522_3687079298" text:style-name="Index_20_Link" text:visited-style-name="Index_20_Link">Booting the computer<text:tab/>6</text:a></text:p>
          <text:p text:style-name="P10"><text:a xlink:type="simple" xlink:href="#__RefHeading___Toc2113_1397740321" text:style-name="Index_20_Link" text:visited-style-name="Index_20_Link">Troubleshooting<text:tab/>7</text:a></text:p>
          <text:p text:style-name="P27"><text:a xlink:type="simple" xlink:href="#__RefHeading___Toc1576_1234797777" text:style-name="Index_20_Link" text:visited-style-name="Index_20_Link">Serial debug output<text:tab/>7</text:a></text:p>
          <text:p text:style-name="P27"><text:a xlink:type="simple" xlink:href="#__RefHeading___Toc1578_1234797777" text:style-name="Index_20_Link" text:visited-style-name="Index_20_Link">Blinking LED, no image mounted<text:tab/>7</text:a></text:p>
          <text:p text:style-name="P27"><text:a xlink:type="simple" xlink:href="#__RefHeading___Toc1578_1234797777%20Copy%201" text:style-name="Index_20_Link" text:visited-style-name="Index_20_Link">Compatibility<text:tab/>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h text:style-name="Figure_20_Index_20_Heading" text:outline-level="1"><text:bookmark-start text:name="__RefHeading___Toc1707_2351436161"/>Index of Figures<text:bookmark-end text:name="__RefHeading___Toc1707_2351436161"/></text:h>
          </text:index-title>
          <text:p text:style-name="P11"><text:a xlink:type="simple" xlink:href="#Figure!0%7Csequence" text:style-name="Index_20_Link" text:visited-style-name="Index_20_Link">Figure 1: Inserting the MicroSD card<text:tab/>5</text:a></text:p>
          <text:p text:style-name="P11"><text:a xlink:type="simple" xlink:href="#Figure!1%7Csequence" text:style-name="Index_20_Link" text:visited-style-name="Index_20_Link">Figure 2: Example daisy-chain<text:tab/>6</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h text:style-name="Table_20_index_20_heading" text:outline-level="1"><text:bookmark-start text:name="__RefHeading___Toc1709_2351436161"/>Index of Tables<text:bookmark-end text:name="__RefHeading___Toc1709_2351436161"/></text:h>
          </text:index-title>
          <text:p text:style-name="P12">Table 1: Example config.txt<text:tab/>4</text:p>
        </text:index-body>
      </text:table-index>
      <text:h text:style-name="P39" text:outline-level="1" text:is-list-header="true"/>
      <text:h text:style-name="P40" text:outline-level="1"><text:bookmark-start text:name="__RefHeading___Toc6618_899895566"/>Introduction<text:bookmark-end text:name="__RefHeading___Toc6618_899895566"/></text:h>
      <text:p text:style-name="P15">BurgerDisk <text:span text:style-name="T30">and DominoDisk are</text:span> Smartport hard disk<text:span text:style-name="T30">s</text:span>, with storage backed on a microSD card, for the Apple II line of computers <text:span text:style-name="T17">running ProDOS</text:span>.</text:p>
      <text:p text:style-name="P36">Both devices share the same firmware and the same features, so this user manual applies equally to both devices.</text:p>
      <text:p text:style-name="P15">It is compatible with the Smartport-enabled <text:span text:style-name="T18">Apple II </text:span>models:</text:p>
      <text:list text:style-name="L1">
        <text:list-item>
          <text:p text:style-name="P48">The Apple //c (apart from the ROM255 version, which can be upgraded)</text:p>
        </text:list-item>
        <text:list-item>
          <text:p text:style-name="P48">The Apple IIgs</text:p>
        </text:list-item>
        <text:list-item>
          <text:p text:style-name="P48">Slotted Apple II computers with a DiskII controller and a SoftSP card.</text:p>
        </text:list-item>
      </text:list>
      <text:p text:style-name="P15"/>
      <text:p text:style-name="P15">It is daisy-chainable, which lets you use other storage devices with it.</text:p>
      <text:p text:style-name="Text_20_body"/>
      <text:h text:style-name="P41" text:outline-level="1"><text:bookmark-start text:name="__RefHeading___Toc193_899895566"/><text:span text:style-name="T16">BurgerDisk </text:span><text:span text:style-name="T20">storage c</text:span>onfiguration<text:bookmark-end text:name="__RefHeading___Toc193_899895566"/></text:h>
      <text:h text:style-name="P45" text:outline-level="2"><text:bookmark-start text:name="__RefHeading___Toc195_899895566 Copy 1"/>Presenting disk images to the computer<text:bookmark-end text:name="__RefHeading___Toc195_899895566 Copy 1"/></text:h>
      <text:p text:style-name="P22">Different image formats are supported: </text:p>
      <text:list text:style-name="L2">
        <text:list-item>
          <text:p text:style-name="P49">.po (in ProDOS-ordered format)</text:p>
        </text:list-item>
        <text:list-item>
          <text:p text:style-name="P49">.2mg <text:span text:style-name="T19">(in ProDOS-ordered format)</text:span></text:p>
        </text:list-item>
        <text:list-item>
          <text:p text:style-name="P49">.<text:span text:style-name="T32">dsk (in ProDOS or DOS3.3-ordered format, but of ProDOS volumes)</text:span></text:p>
        </text:list-item>
        <text:list-item>
          <text:p text:style-name="P49">.<text:span text:style-name="T32">hdv</text:span></text:p>
        </text:list-item>
      </text:list>
      <text:p text:style-name="P23">These images can be either 140KB, 400KB, 800KB, or an arbitrary number of blocks up to 32MB (65535 blocks).</text:p>
      <text:p text:style-name="P24">The BurgerDisk does <text:span text:style-name="T3">not</text:span> support .woz, .nib, .edf, .do images.</text:p>
      <text:p text:style-name="P23"><text:span text:style-name="T10">BurgerDisk uses </text:span>these <text:span text:style-name="T10">disk images to present to ProDOS. They are stored as files on the MicroSD card, formatted as FAT. </text:span></text:p>
      <text:p text:style-name="P15">By default, the firmware will search for four files: PART1.po, PART2.po, PART3.po, PART4.po, and present them if they exist.</text:p>
      <text:p text:style-name="P15">You can also put images with arbitrary names, and reference at most four of them in the <text:span text:style-name="T3">config.txt</text:span><text:span text:style-name="T11"> file at the root of the MicroSD’s filesystem.</text:span></text:p>
      <text:p text:style-name="P16">Table <text:sequence text:ref-name="refTable0" text:name="Table" text:formula="ooow:Table+1" style:num-format="1">1</text:sequence>: Example config.txt</text:p>
      <table:table table:name="Table1" table:style-name="Table1">
        <table:table-column table:style-name="Table1.A"/>
        <table:table-row>
          <table:table-cell table:style-name="Table1.A1" office:value-type="string">
            <text:p text:style-name="P17">A2DeskTop-1.5-en_800k.2mg</text:p>
            <text:p text:style-name="P17">Total Replay v5.2.hdv</text:p>
            <text:p text:style-name="P18">Documents.po</text:p>
          </table:table-cell>
        </table:table-row>
      </table:table>
      <text:p text:style-name="P19"/>
      <text:p text:style-name="P36">Your Apple II can boot from any slot, but only from the first device in any slot. For the BurgerDisk, this means you can boot from the first partition if the device is first in the daisy-chain. Booting from another partition requires modifying their order in config.txt.</text:p>
      <text:p text:style-name="P14">Afterwards, you can insert the MicroSD card in its slot (face up, connector down), connect your device to your Apple II, and boot it.</text:p>
      <text:p text:style-name="P13"><draw:frame draw:style-name="fr1" draw:name="Frame2" text:anchor-type="char" svg:width="3.7362in" draw:z-index="2"><draw:text-box fo:min-height="3.1661in"><text:p text:style-name="Figure"><draw:frame draw:style-name="fr3" draw:name="Image2" text:anchor-type="paragraph" svg:width="3.7362in" style:rel-width="100%" svg:height="3.1661in" style:rel-height="scale" draw:z-index="3"><draw:image xlink:href="Pictures/1000000100000474000003C67FB76F5F.png" xlink:type="simple" xlink:show="embed" xlink:actuate="onLoad" draw:mime-type="image/png"/></draw:frame>Figure <text:sequence text:ref-name="refFigure0" text:name="Figure" text:formula="ooow:Figure+1" style:num-format="1">1</text:sequence>: Inserting the MicroSD card</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31"><text:span text:style-name="T31">P</text:span>ush the card until it clicks in place. <text:span text:style-name="T31">Push it again to remove it.</text:span></text:p>
      <text:h text:style-name="P46" text:outline-level="2"><text:bookmark-start text:name="__RefHeading___Toc195_899895566 Copy 1 Copy 1"/>Debugging and <text:span text:style-name="T28">options</text:span><text:bookmark-end text:name="__RefHeading___Toc195_899895566 Copy 1 Copy 1"/></text:h>
      <text:p text:style-name="P35"><text:span text:style-name="T6">d</text:span><text:span text:style-name="T5">ebug (default 0)</text:span><text:span text:style-name="T28">: </text:span><text:span text:style-name="T29">If you would like to work on the BurgerDisk firmware, enabling debug messages on its serial port will be useful. You can do that by adding </text:span><text:span text:style-name="T4">debug=1</text:span><text:span text:style-name="T14"> in </text:span><text:span text:style-name="T12">an</text:span><text:span text:style-name="T14"> </text:span><text:span text:style-name="T22">options</text:span><text:span text:style-name="T23">.txt</text:span><text:span text:style-name="T14"> </text:span><text:span text:style-name="T12">file </text:span><text:span text:style-name="T13">at the root of the SD card</text:span><text:span text:style-name="T12">.</text:span></text:p>
      <text:p text:style-name="P34"><text:span text:style-name="T3">force_next_smartport (default 1): </text:span><text:span text:style-name="T12">B</text:span><text:span text:style-name="T11">y default, BurgerDisk lies to the controller, telling it there are more Smartport devices after it. This makes chaining an SPIISD (or other devices that do not correctly advertise themselves as Smartport devices) possible. It has no adverse effects, but this can be disabled using </text:span><text:span text:style-name="T3">force_next_smartport=0</text:span><text:span text:style-name="T11"> in the </text:span><text:span text:style-name="T21">options.txt</text:span><text:span text:style-name="T11"> file.</text:span></text:p>
      <text:h text:style-name="P42" text:outline-level="1"><text:bookmark-start text:name="__RefHeading___Toc520_3687079298"/>BurgerDisk installation<text:bookmark-end text:name="__RefHeading___Toc520_3687079298"/></text:h>
      <text:p text:style-name="P28"><text:span text:style-name="T30">To connect</text:span> the BurgerDisk to your Apple II, <text:span text:style-name="T30">you can</text:span> either <text:span text:style-name="T30">plug it</text:span> directly to the computer, or to another device, in what is called a Daisy Chain. This allows you to have multiple storage devices connected to your computer. <text:span text:style-name="T30">Daisy chains have rules about devices ordering:</text:span></text:p>
      <text:p text:style-name="P28">- First “dumb” 3.5” floppy drives, like the Apple 3.5 Drive <text:span text:style-name="T24">(A9M0106)</text:span></text:p>
      <text:p text:style-name="P29">- then Smartport <text:span text:style-name="T26">devices</text:span>, like the Unidisk 3.5 <text:span text:style-name="T24">(</text:span><text:span text:style-name="T25">A2M2053</text:span><text:span text:style-name="T24">) </text:span><text:span text:style-name="T26">or</text:span><text:span text:style-name="T24"> </text:span><text:span text:style-name="T26">the BurgerDisk</text:span></text:p>
      <text:p text:style-name="P28">- followed by 5.25” floppy drives <text:span text:style-name="T30">(except on Liron cards, which do not handle 5.25” drives at all)</text:span></text:p>
      <text:p text:style-name="P36"><draw:frame draw:style-name="fr1" draw:name="Frame1" text:anchor-type="char" svg:width="6.6953in" draw:z-index="0"><draw:text-box fo:min-height="2.7992in"><text:p text:style-name="Figure"><draw:frame draw:style-name="fr2" draw:name="Image1" text:anchor-type="paragraph" svg:width="6.6953in" style:rel-width="100%" svg:height="2.7992in" style:rel-height="scale" draw:z-index="1"><draw:image xlink:href="Pictures/10000001000007980000032D01B4C29C.png" xlink:type="simple" xlink:show="embed" xlink:actuate="onLoad" draw:mime-type="image/png"/></draw:frame>Figure <text:sequence text:ref-name="refFigure1" text:name="Figure" text:formula="ooow:Figure+1" style:num-format="1">2</text:sequence>: Example daisy-chain</text:p></draw:text-box></draw:frame>In this example, the Apple II will be able to boot from the Unidisk 3.5”. To boot from the BurgerDisk’s first partition, invert the Unidisk 3.5” and BurgerDisk, so that the BurgerDisk is connected to the computer, the Unidisk connected to the BurgerDisk, and the Disk //c connected to the Unidisk.</text:p>
      <text:h text:style-name="P43" text:outline-level="1"><text:bookmark-start text:name="__RefHeading___Toc522_3687079298"/>Booting the computer<text:bookmark-end text:name="__RefHeading___Toc522_3687079298"/></text:h>
      <text:p text:style-name="P30">The Apple II can boot from the first device in a given slot. Smartport devices are usually in slot #5, and 5.25” drives in slot #6.</text:p>
      <text:p text:style-name="P30">If you want to boot your Apple II from the BurgerDisk, use a bootable image, like A2Desktop, as first image; and connect the BurgerDisk first to the computer.</text:p>
      <text:p text:style-name="P26"><text:soft-page-break/>Note: this means that you cannot directly boot from the BurgerDisk if a<text:span text:style-name="T27">n</text:span> <text:span text:style-name="T27">Apple </text:span>3.5” drive <text:span text:style-name="T27">(</text:span><text:span text:style-name="T24">A9M0106</text:span><text:span text:style-name="T27">) </text:span>is present in your chain, even if no floppy is inserted into it; <text:span text:style-name="T30">because the A9M0106 drive </text:span><text:span text:style-name="T8">has</text:span><text:span text:style-name="T30"> to be connected first.</text:span></text:p>
      <text:h text:style-name="P44" text:outline-level="1"><text:bookmark-start text:name="__RefHeading___Toc2113_1397740321"/>Troubleshooting<text:bookmark-end text:name="__RefHeading___Toc2113_1397740321"/></text:h>
      <text:h text:style-name="P47" text:outline-level="2"><text:bookmark-start text:name="__RefHeading___Toc1576_1234797777"/>Serial debug output<text:bookmark-end text:name="__RefHeading___Toc1576_1234797777"/></text:h>
      <text:p text:style-name="P13">If you are investigating a problem or experimenting with your own modifications of the firmware, you might want to enable debug output on the Arduino’s serial port.</text:p>
      <text:p text:style-name="P13">This can be enabled with a <text:span text:style-name="T3">debug=1</text:span><text:span text:style-name="T11"> line </text:span><text:span text:style-name="T15">in</text:span><text:span text:style-name="T11"> </text:span><text:span text:style-name="T3">o</text:span><text:span text:style-name="T7">ptions</text:span><text:span text:style-name="T3">.txt</text:span><text:span text:style-name="T11">.</text:span></text:p>
      <text:p text:style-name="P13"><text:span text:style-name="T11">Afterwards, you can open the enclosure, locate the UART port, and connect an UART to USB adapter to it. Connect the UART’s </text:span><text:span text:style-name="T3">GND</text:span><text:span text:style-name="T11"> to the adapter’s </text:span><text:span text:style-name="T3">GND</text:span><text:span text:style-name="T11">, and the UART’s </text:span><text:span text:style-name="T3">TX</text:span><text:span text:style-name="T11"> to the adapter’s </text:span><text:span text:style-name="T3">RX</text:span><text:span text:style-name="T11">.</text:span></text:p>
      <text:h text:style-name="P47" text:outline-level="2"><text:bookmark-start text:name="__RefHeading___Toc1578_1234797777"/>Blinking LED, no image mounted<text:bookmark-end text:name="__RefHeading___Toc1578_1234797777"/></text:h>
      <text:p text:style-name="P13">If after booting the Apple II, a small delay happens, followed by the BurgerDisk’s LED blinking 4 times per second, and none of its volumes are visible by ProDOS, this means that the MicroSD card initialization failed, or that zero valid images were found on the card. Verify its presence and contents.</text:p>
      <text:h text:style-name="P47" text:outline-level="2"><text:bookmark-start text:name="__RefHeading___Toc1578_1234797777 Copy 1"/>Compatibility<text:bookmark-end text:name="__RefHeading___Toc1578_1234797777 Copy 1"/></text:h>
      <text:p text:style-name="P13">So far, the BurgerDisk has been tested on:</text:p>
      <text:list text:style-name="L3">
        <text:list-item>
          <text:p text:style-name="P50">Apple //c ROM3, model A2S4000</text:p>
        </text:list-item>
        <text:list-item>
          <text:p text:style-name="P50">Apple //c ROM4x, model A2S4100</text:p>
        </text:list-item>
        <text:list-item>
          <text:p text:style-name="P50">Apple IIgs, ROM01</text:p>
        </text:list-item>
        <text:list-item>
          <text:p text:style-name="P51">Apple IIe, Liron card</text:p>
        </text:list-item>
        <text:list-item>
          <text:p text:style-name="P53">Apple IIe, DiskII controller + SoftSP card</text:p>
        </text:list-item>
      </text:list>
      <text:p text:style-name="P20">Various daisy chaining configurations have been tested:</text:p>
      <text:list text:style-name="L4">
        <text:list-item>
          <text:p text:style-name="P54">only the BurgerDisk on the Smartport bus</text:p>
        </text:list-item>
        <text:list-item>
          <text:p text:style-name="P54">Unidisk 3.5”, then BurgerDisk</text:p>
        </text:list-item>
        <text:list-item>
          <text:p text:style-name="P54">BurgerDisk, then Disk //c</text:p>
        </text:list-item>
        <text:list-item>
          <text:p text:style-name="P54"><text:soft-page-break/>Unidisk 3.5”, then BurgerDisk, then Disk //c</text:p>
        </text:list-item>
        <text:list-item>
          <text:p text:style-name="P54">Unidisk 3.5”, then BurgerDisk, then another BurgerDisk, then Disk //c</text:p>
        </text:list-item>
        <text:list-item>
          <text:p text:style-name="P52">BurgerDisk, then Unidisk 3.5”, then Disk //c</text:p>
        </text:list-item>
      </text:list>
      <text:p text:style-name="P33">In case of problems in a daisy chain, verify that your chain respect Apple’s rules, and that the chained devices are actually able to be chained.</text:p>
      <text:p text:style-name="P20"/>
      <text:p text:style-name="P32"><text:span text:style-name="T3">Liron card notes</text:span>: the Liron card is not able to drive a 5.25” drive.</text:p>
      <text:p text:style-name="P32"><text:span text:style-name="T3">SoftSP card notes</text:span>: the SoftSP card is not able to drive a Unidisk 3.5” drive. It has annoying, but non-blocking issues with 5.25” drives.</text:p>
      <text:p text:style-name="P20"/>
      <text:p text:style-name="P21">Compatibility with the SPIISD, Fujinet, or other Smartport-based devices has not yet been tested.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master-page-name="">
      <style:paragraph-properties fo:margin-left="0.2362in" fo:margin-right="0in" fo:text-indent="-0.2362in" style:auto-text-indent="false" style:page-number="auto" text:number-lines="false" text:line-number="0"/>
      <style:text-properties style:font-name="Latin Modern Mono1" fo:font-family="'Latin Modern Mono'" style:font-style-name="10 Regular" style:font-pitch="fixed"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6-06-17T05:52:31.045968704</dc:date>
    <meta:editing-duration>P1DT20H46M15S</meta:editing-duration>
    <meta:editing-cycles>338</meta:editing-cycles>
    <meta:generator>LibreOffice/24.2.7.2$Linux_X86_64 LibreOffice_project/420$Build-2</meta:generator>
    <meta:print-date>2023-09-21T10:14:18.194577295</meta:print-date>
    <meta:document-statistic meta:table-count="1" meta:image-count="2" meta:object-count="0" meta:page-count="8" meta:paragraph-count="94" meta:word-count="1057" meta:character-count="6221" meta:non-whitespace-character-count="5272"/>
  </office:meta>
</office:document-meta>
</file>