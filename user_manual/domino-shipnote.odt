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7B0000007B0F3D655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atin Modern Mono" svg:font-family="'Latin Modern Mono'" style:font-pitch="fixed"/>
    <style:font-face style:name="Latin Modern Mono1" svg:font-family="'Latin Modern Mono'" style:font-adornments="10 Regular" style:font-pitch="fixed"/>
    <style:font-face style:name="Latin Modern Mono2" svg:font-family="'Latin Modern Mono'" style:font-adornments="Bold" style:font-pitch="fixed"/>
    <style:font-face style:name="Latin Modern Mono3" svg:font-family="'Latin Modern Mono'" style:font-adornments="Regular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1.3118in" style:rel-column-width="12842*"/>
    </style:style>
    <style:style style:name="Table1.B" style:family="table-column">
      <style:table-column-properties style:column-width="5.3833in" style:rel-column-width="52693*"/>
    </style:style>
    <style:style style:name="Table1.A1" style:family="table-cell">
      <style:table-cell-properties fo:padding="0.0382in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style:font-name="Latin Modern Mono" fo:font-weight="bold" officeooo:rsid="00108780" officeooo:paragraph-rsid="00108780" style:font-weight-asian="bold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Latin Modern Mono" fo:font-size="16pt" fo:font-weight="bold" officeooo:rsid="00108780" officeooo:paragraph-rsid="00108780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end" style:justify-single-word="false"/>
      <style:text-properties style:font-name="Latin Modern Mono" fo:font-size="16pt" fo:font-weight="bold" officeooo:rsid="0172168e" officeooo:paragraph-rsid="0172168e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atin Modern Mono" fo:font-weight="normal" officeooo:rsid="0172168e" officeooo:paragraph-rsid="0172168e" style:font-weight-asian="normal" style:font-weight-complex="normal"/>
    </style:style>
    <style:style style:name="P6" style:family="paragraph" style:parent-style-name="Table_20_Contents">
      <style:text-properties style:font-name="Latin Modern Mono1"/>
    </style:style>
    <style:style style:name="P7" style:family="paragraph" style:parent-style-name="Text_20_body">
      <style:text-properties officeooo:rsid="015ebbfa" officeooo:paragraph-rsid="015ebbfa"/>
    </style:style>
    <style:style style:name="P8" style:family="paragraph" style:parent-style-name="Text_20_body">
      <style:text-properties fo:font-weight="bold" officeooo:rsid="0172168e" officeooo:paragraph-rsid="0172b765" style:font-weight-asian="bold" style:font-weight-complex="bold"/>
    </style:style>
    <style:style style:name="P9" style:family="paragraph" style:parent-style-name="Text_20_body">
      <style:text-properties fo:font-weight="bold" officeooo:rsid="017ff248" officeooo:paragraph-rsid="017ff248" style:font-weight-asian="bold" style:font-weight-complex="bold"/>
    </style:style>
    <style:style style:name="P10" style:family="paragraph" style:parent-style-name="Text_20_body">
      <style:text-properties fo:font-weight="normal" officeooo:rsid="0172168e" officeooo:paragraph-rsid="0172168e" style:font-weight-asian="normal" style:font-weight-complex="normal"/>
    </style:style>
    <style:style style:name="P11" style:family="paragraph" style:parent-style-name="Text_20_body">
      <style:text-properties fo:font-weight="normal" officeooo:rsid="017ff455" officeooo:paragraph-rsid="017ff455" style:font-weight-asian="normal" style:font-weight-complex="normal"/>
    </style:style>
    <style:style style:name="P12" style:family="paragraph" style:parent-style-name="Text_20_body_20_indent">
      <style:text-properties officeooo:rsid="018315a5" officeooo:paragraph-rsid="018315a5"/>
    </style:style>
    <style:style style:name="P13" style:family="paragraph" style:parent-style-name="Standard" style:master-page-name="First_20_Page">
      <style:paragraph-properties fo:text-align="end" style:justify-single-word="false" style:page-number="auto"/>
      <style:text-properties style:font-name="Latin Modern Mono" fo:font-size="16pt" fo:font-weight="bold" officeooo:rsid="00108780" officeooo:paragraph-rsid="00108780" style:font-size-asian="16pt" style:font-weight-asian="bold" style:font-size-complex="16pt" style:font-weight-complex="bold"/>
    </style:style>
    <style:style style:name="T1" style:family="text">
      <style:text-properties officeooo:rsid="0155f19b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17ff248"/>
    </style:style>
    <style:style style:name="T4" style:family="text">
      <style:text-properties officeooo:rsid="01816f91"/>
    </style:style>
    <style:style style:name="T5" style:family="text">
      <style:text-properties officeooo:rsid="01846d7e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3">DominoDisk</text:span><text:span text:style-name="T1"> Smartport Hard Disk</text:span> for Apple II</text:p>
      <text:p text:style-name="P3"/>
      <text:p text:style-name="P4">Quickstart</text:p>
      <text:p text:style-name="P2"/>
      <text:p text:style-name="P5">Thank you for getting a <text:span text:style-name="T3">DominoDisk</text:span>! I hope you will like it.</text:p>
      <text:p text:style-name="P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<draw:frame draw:style-name="fr1" draw:name="Image2" text:anchor-type="char" svg:x="-0.0327in" svg:y="-0.0209in" svg:width="1.2811in" svg:height="1.2811in" draw:z-index="0"><draw:image xlink:href="Pictures/100000010000007B0000007B0F3D6552.png" xlink:type="simple" xlink:show="embed" xlink:actuate="onLoad" draw:mime-type="image/png"/></draw:frame></text:p>
          </table:table-cell>
          <table:table-cell table:style-name="Table1.A1" office:value-type="string">
            <text:p text:style-name="P8">The User Manual <text:span text:style-name="T2">is available at </text:span><text:a xlink:type="simple" xlink:href="https://www.colino.net/wordpress/wp-content/burgerdisk-user-manual.pdf" text:style-name="Internet_20_link" text:visited-style-name="Visited_20_Internet_20_Link"><text:span text:style-name="T2">https://www.colino.net/wordpress/wp-content/burgerdisk-user-manual.pdf</text:span></text:a></text:p>
            <text:p text:style-name="P9"><text:span text:style-name="T2"/></text:p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8"><text:span text:style-name="T2"/></text:p>
          </table:table-cell>
        </table:table-row>
      </table:table>
      <text:p text:style-name="P10"/>
      <text:p text:style-name="P11">Here are the most relevant parts:</text:p>
      <text:p text:style-name="List"/>
      <text:p text:style-name="List">Insert a FAT-formatted microSD card in the slot, face up. The <text:span text:style-name="T5">ProDOS </text:span>volumes presented to the Apple II must be named PART1.po to PART4.po, or be referenced in a config.txt file containing up to four lines with the filenames. For example:</text:p>
      <text:p text:style-name="Text_20_body_20_indent">A2Desktop.hdv</text:p>
      <text:p text:style-name="Text_20_body_20_indent">Total_Replay.hdv</text:p>
      <text:p text:style-name="Text_20_body_20_indent">ProDOS 2.4.3.po</text:p>
      <text:p text:style-name="P12">System Utilities.dsk</text:p>
      <text:p text:style-name="P11"/>
      <text:p text:style-name="P11">Do not hotplug Apple II storage devices <text:span text:style-name="T4">while the Apple II is powered on</text:span>.</text:p>
      <text:p text:style-name="P11"/>
      <text:p text:style-name="P11">Plug any “dumb” 3.5inch drive first, followed by the DominoDisk and Smartport devices, followed by 5.25” drives.</text:p>
      <text:p text:style-name="P11"/>
      <text:p text:style-name="P11">Have fun,</text:p>
      <text:p text:style-name="P11">Colin - colin@colino.ne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atin Modern Mono" svg:font-family="'Latin Modern Mono'" style:font-pitch="fixed"/>
    <style:font-face style:name="Latin Modern Mono1" svg:font-family="'Latin Modern Mono'" style:font-adornments="10 Regular" style:font-pitch="fixed"/>
    <style:font-face style:name="Latin Modern Mono2" svg:font-family="'Latin Modern Mono'" style:font-adornments="Bold" style:font-pitch="fixed"/>
    <style:font-face style:name="Latin Modern Mono3" svg:font-family="'Latin Modern Mono'" style:font-adornments="Regular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Latin Modern Mono1" fo:font-family="'Latin Modern Mono'" style:font-style-name="10 Regular" style:font-pitch="fixed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Latin Modern Mono" fo:font-family="'Latin Modern Mono'" style:font-pitch="fixed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Latin Modern Mono" fo:font-family="'Latin Modern Mono'" style:font-pitch="fixed" fo:font-size="12pt" fo:font-weight="bold" officeooo:rsid="00108780" style:font-size-asian="12pt" style:font-weight-asian="bold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style:font-name="Latin Modern Mono" fo:font-family="'Latin Modern Mono'" style:font-pitch="fixed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="Latin Modern Mono1" fo:font-family="'Latin Modern Mono'" style:font-style-name="10 Regular" style:font-pitch="fixe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style:font-name="Latin Modern Mono1" fo:font-family="'Latin Modern Mono'" style:font-style-name="10 Regular" style:font-pitch="fixed"/>
    </style:style>
    <style:style style:name="Figure" style:family="paragraph" style:parent-style-name="Caption" style:class="extra">
      <style:text-properties style:font-name="Latin Modern Mono1" fo:font-family="'Latin Modern Mono'" style:font-style-name="10 Regular" style:font-pitch="fixed" fo:font-size="10pt" fo:font-style="normal"/>
    </style:style>
    <style:style style:name="User_20_Index_20_Heading" style:display-name="User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Figure_20_Index_20_Heading" style:display-name="Figure Index Heading" style:family="paragraph" style:parent-style-name="Index_20_Heading" style:default-outline-level="1" style:list-style-name="" style:class="index">
      <style:paragraph-properties fo:margin-left="0in" fo:margin-right="0in" fo:text-indent="0in" style:auto-text-indent="false" text:number-lines="false" text:line-number="0"/>
      <style:text-properties style:font-name="Latin Modern Mono2" fo:font-family="'Latin Modern Mono'" style:font-style-name="Bold" style:font-pitch="fixed"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="Latin Modern Mono1" fo:font-family="'Latin Modern Mono'" style:font-style-name="10 Regular" style:font-pitch="fixe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Latin Modern Mono3" fo:font-family="'Latin Modern Mono'" style:font-style-name="Regular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style:font-name="Latin Modern Mono" fo:font-family="'Latin Modern Mono'" style:font-pitch="fixed" fo:font-weight="bold" officeooo:rsid="0020c7a4" style:font-weight-asian="bold" style:font-weight-complex="bold"/>
    </style:style>
    <style:style style:name="Table" style:family="paragraph" style:parent-style-name="Caption" style:class="extra">
      <style:paragraph-properties fo:padding="0.0201in" fo:border="none"/>
      <style:text-properties style:font-name="Latin Modern Mono1" fo:font-family="'Latin Modern Mono'" style:font-style-name="10 Regular" style:font-pitch="fixed" fo:font-style="normal"/>
    </style:style>
    <style:style style:name="Table_20_index_20_heading" style:display-name="Table index heading" style:family="paragraph" style:parent-style-name="Index_20_Heading" style:default-outline-level="1" style:list-style-name="" style:class="index">
      <style:paragraph-properties fo:margin-left="0in" fo:margin-right="0in" fo:text-indent="0in" style:auto-text-indent="false" text:number-lines="false" text:line-number="0"/>
      <style:text-properties style:font-name="Latin Modern Mono2" fo:font-family="'Latin Modern Mono'" style:font-style-name="Bold" style:font-pitch="fixed"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="Latin Modern Mono1" fo:font-family="'Latin Modern Mono'" style:font-style-name="10 Regular" style:font-pitch="fixe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Latin Modern Mono1" fo:font-family="'Latin Modern Mono'" style:font-style-name="10 Regular" style:font-pitch="fixed"/>
    </style:style>
    <style:style style:name="Frame_20_contents" style:display-name="Frame contents" style:family="paragraph" style:parent-style-name="Standard" style:class="extra"/>
    <style:style style:name="Contents_20_10" style:display-name="Contents 10" style:family="paragraph" style:parent-style-name="Index" style:class="index">
      <style:paragraph-properties fo:margin-left="1.7717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Footnote" style:family="paragraph" style:parent-style-name="Standard" style:class="extra" style:master-page-name="">
      <style:paragraph-properties fo:margin-left="0.2362in" fo:margin-right="0in" fo:text-indent="-0.2362in" style:auto-text-indent="false" style:page-number="auto" text:number-lines="false" text:line-number="0"/>
      <style:text-properties style:font-name="Latin Modern Mono1" fo:font-family="'Latin Modern Mono'" style:font-style-name="10 Regular" style:font-pitch="fixed" fo:font-size="10pt" style:font-size-asian="10pt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text-indent="0in" style:auto-text-indent="false"/>
    </style:style>
    <style:style style:name="List_20_1" style:display-name="List 1" style:family="paragraph" style:parent-style-name="List" style:class="list">
      <style:paragraph-properties fo:margin-left="0.25in" fo:margin-top="0in" fo:margin-bottom="0.0835in" style:contextual-spacing="false" fo:text-indent="-0.25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2701in" fo:page-height="11.6902in" style:num-format="i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0</text:page-number></text:p>
      </style:footer>
      <style:footer-left>
        <text:p text:style-name="MP1"/>
      </style:footer-left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Forepages" style:page-layout-name="Mpm9" draw:style-name="Mdp1">
      <style:footer>
        <text:p text:style-name="Footer"><text:page-number text:select-page="current">0</text:page-number></text:p>
      </style:footer>
      <style:footer-left>
        <text:p text:style-name="MP1"><text:page-number text:select-page="current">0</text:page-number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21:14:51.144711740</meta:creation-date>
    <dc:date>2026-06-17T08:05:20.026963627</dc:date>
    <meta:editing-duration>P2DT3M54S</meta:editing-duration>
    <meta:editing-cycles>340</meta:editing-cycles>
    <meta:generator>LibreOffice/24.2.7.2$Linux_X86_64 LibreOffice_project/420$Build-2</meta:generator>
    <meta:print-date>2026-06-17T07:45:56.296949274</meta:print-date>
    <meta:document-statistic meta:table-count="1" meta:image-count="1" meta:object-count="0" meta:page-count="1" meta:paragraph-count="17" meta:word-count="119" meta:character-count="770" meta:non-whitespace-character-count="668"/>
  </office:meta>
</office:document-meta>
</file>