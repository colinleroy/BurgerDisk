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B0000007B0F3D65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3118in" style:rel-column-width="12842*"/>
    </style:style>
    <style:style style:name="Table1.B" style:family="table-column">
      <style:table-column-properties style:column-width="5.3833in" style:rel-column-width="52693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atin Modern Mono" fo:font-weight="bold" officeooo:rsid="00108780" officeooo:paragraph-rsid="0010878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atin Modern Mono" fo:font-size="16pt" fo:font-weight="bold" officeooo:rsid="0172168e" officeooo:paragraph-rsid="0172168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atin Modern Mono" fo:font-weight="normal" officeooo:rsid="0172168e" officeooo:paragraph-rsid="0172168e" style:font-weight-asian="normal" style:font-weight-complex="normal"/>
    </style:style>
    <style:style style:name="P6" style:family="paragraph" style:parent-style-name="Table_20_Contents">
      <style:text-properties style:font-name="Latin Modern Mono1"/>
    </style:style>
    <style:style style:name="P7" style:family="paragraph" style:parent-style-name="Text_20_body">
      <style:text-properties officeooo:rsid="015ebbfa" officeooo:paragraph-rsid="015ebbfa"/>
    </style:style>
    <style:style style:name="P8" style:family="paragraph" style:parent-style-name="Text_20_body">
      <style:text-properties fo:font-weight="bold" officeooo:rsid="0172168e" officeooo:paragraph-rsid="0172b765" style:font-weight-asian="bold" style:font-weight-complex="bold"/>
    </style:style>
    <style:style style:name="P9" style:family="paragraph" style:parent-style-name="Text_20_body">
      <style:text-properties fo:font-weight="bold" officeooo:rsid="017ff248" officeooo:paragraph-rsid="017ff248" style:font-weight-asian="bold" style:font-weight-complex="bold"/>
    </style:style>
    <style:style style:name="P10" style:family="paragraph" style:parent-style-name="Text_20_body">
      <style:text-properties fo:font-weight="normal" officeooo:rsid="0172168e" officeooo:paragraph-rsid="0172168e" style:font-weight-asian="normal" style:font-weight-complex="normal"/>
    </style:style>
    <style:style style:name="P11" style:family="paragraph" style:parent-style-name="Text_20_body">
      <style:text-properties fo:font-weight="normal" officeooo:rsid="017ff455" officeooo:paragraph-rsid="017ff455" style:font-weight-asian="normal" style:font-weight-complex="normal"/>
    </style:style>
    <style:style style:name="P12" style:family="paragraph" style:parent-style-name="Standard" style:master-page-name="First_20_Page">
      <style:paragraph-properties fo:text-align="end" style:justify-single-word="false" style:page-number="auto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13" style:family="paragraph" style:parent-style-name="Text_20_body_20_indent">
      <style:text-properties officeooo:rsid="018315a5" officeooo:paragraph-rsid="018315a5"/>
    </style:style>
    <style:style style:name="T1" style:family="text">
      <style:text-properties officeooo:rsid="0155f19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17ff248"/>
    </style:style>
    <style:style style:name="T4" style:family="text">
      <style:text-properties officeooo:rsid="01816f91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">DominoDisk</text:span><text:span text:style-name="T1"> Smartport Hard Disk</text:span> for Apple II</text:p>
      <text:p text:style-name="P3"/>
      <text:p text:style-name="P4">Quickstart</text:p>
      <text:p text:style-name="P2"/>
      <text:p text:style-name="P5">Thank you for getting a <text:span text:style-name="T3">DominoDisk</text:span>! I hope you will like it.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Image2" text:anchor-type="char" svg:x="-0.0327in" svg:y="-0.0209in" svg:width="1.2811in" svg:height="1.2811in" draw:z-index="0"><draw:image xlink:href="Pictures/100000010000007B0000007B0F3D6552.png" xlink:type="simple" xlink:show="embed" xlink:actuate="onLoad" draw:mime-type="image/png"/></draw:frame></text:p>
          </table:table-cell>
          <table:table-cell table:style-name="Table1.A1" office:value-type="string">
            <text:p text:style-name="P8">The User Manual <text:span text:style-name="T2">is available at </text:span><text:a xlink:type="simple" xlink:href="https://www.colino.net/wordpress/wp-content/burgerdisk-user-manual.pdf" text:style-name="Internet_20_link" text:visited-style-name="Visited_20_Internet_20_Link"><text:span text:style-name="T2">https://www.colino.net/wordpress/wp-content/burgerdisk-user-manual.pdf</text:span></text:a></text:p>
            <text:p text:style-name="P9"><text:span text:style-name="T2"/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<text:span text:style-name="T2"/></text:p>
          </table:table-cell>
        </table:table-row>
      </table:table>
      <text:p text:style-name="P10"/>
      <text:p text:style-name="P11">Here are the most relevant parts:</text:p>
      <text:p text:style-name="List"/>
      <text:p text:style-name="List">Insert a FAT-formatted microSD card in the slot, face up. The volumes presented to the Apple II must be named PART1.po to PART4.po, or be referenced in a config.txt file containing up to four lines with the filenames. For example:</text:p>
      <text:p text:style-name="Text_20_body_20_indent">A2Desktop.hdv</text:p>
      <text:p text:style-name="Text_20_body_20_indent">Total_Replay.hdv</text:p>
      <text:p text:style-name="Text_20_body_20_indent">ProDOS 2.4.3.po</text:p>
      <text:p text:style-name="P13">System Utilities.dsk</text:p>
      <text:p text:style-name="P11"/>
      <text:p text:style-name="P11">Do not hotplug Apple II storage devices <text:span text:style-name="T4">while the Apple II is powered on</text:span>.</text:p>
      <text:p text:style-name="P11"/>
      <text:p text:style-name="P11">Plug any “dumb” 3.5inch drive first, followed by the DominoDisk and Smartport devices, followed by 5.25” drives.</text:p>
      <text:p text:style-name="P11"/>
      <text:p text:style-name="P11">Have fun,</text:p>
      <text:p text:style-name="P11">Colin</text:p>
      <text:p text:style-name="P11"><text:soft-page-break/>colin@colino.ne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atin Modern Mono1" fo:font-family="'Latin Modern Mono'" style:font-style-name="10 Regular" style:font-pitch="fixe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atin Modern Mono" fo:font-family="'Latin Modern Mono'" style:font-pitch="fixed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atin Modern Mono" fo:font-family="'Latin Modern Mono'" style:font-pitch="fixed" fo:font-size="12pt" fo:font-weight="bold" officeooo:rsid="00108780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Latin Modern Mono" fo:font-family="'Latin Modern Mono'" style:font-pitch="fixed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igure" style:family="paragraph" style:parent-style-name="Caption" style:class="extra">
      <style:text-properties style:font-name="Latin Modern Mono1" fo:font-family="'Latin Modern Mono'" style:font-style-name="10 Regular" style:font-pitch="fixed" fo:font-size="10pt" fo:font-style="normal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in Modern Mono3" fo:font-family="'Latin Modern Mono'" style:font-style-name="Regular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atin Modern Mono" fo:font-family="'Latin Modern Mono'" style:font-pitch="fixed" fo:font-weight="bold" officeooo:rsid="0020c7a4" style:font-weight-asian="bold" style:font-weight-complex="bold"/>
    </style:style>
    <style:style style:name="Table" style:family="paragraph" style:parent-style-name="Caption" style:class="extra">
      <style:paragraph-properties fo:padding="0.0201in" fo:border="none"/>
      <style:text-properties style:font-name="Latin Modern Mono1" fo:font-family="'Latin Modern Mono'" style:font-style-name="10 Regular" style:font-pitch="fixed" fo:font-style="normal"/>
    </style:style>
    <style:style style:name="Table_20_index_20_heading" style:display-name="Tabl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/>
      <style:text-properties style:font-name="Latin Modern Mono1" fo:font-family="'Latin Modern Mono'" style:font-style-name="10 Regular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i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0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Forepages" style:page-layout-name="Mpm9" draw:style-name="Mdp1">
      <style:footer>
        <text:p text:style-name="Footer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14:51.144711740</meta:creation-date>
    <dc:date>2026-06-17T05:50:51.761873862</dc:date>
    <meta:editing-duration>P1DT22H19M2S</meta:editing-duration>
    <meta:editing-cycles>338</meta:editing-cycles>
    <meta:generator>LibreOffice/24.2.7.2$Linux_X86_64 LibreOffice_project/420$Build-2</meta:generator>
    <meta:print-date>2026-02-15T17:40:41.522476742</meta:print-date>
    <meta:document-statistic meta:table-count="1" meta:image-count="1" meta:object-count="0" meta:page-count="2" meta:paragraph-count="18" meta:word-count="117" meta:character-count="760" meta:non-whitespace-character-count="661"/>
  </office:meta>
</office:document-meta>
</file>